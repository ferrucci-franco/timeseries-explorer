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69">
      <number:month number:style="short" number:textual="false"/>
      <number:text>/</number:text>
      <number:day number:style="short"/>
      <number:text>/</number:text>
      <number:year/>
    </number:date-style>
    <style:style style:name="ce1" style:family="table-cell" style:parent-style-name="Default" style:data-style-name="N37"/>
    <style:style style:name="ce69" style:family="table-cell" style:parent-style-name="Default" style:data-style-name="N69"/>
  </office:automatic-styles>
  <office:body>
    <office:spreadsheet>
      <table:table table:name="Data" table:style-name="ta1">
        <table:table-row>
          <table:table-cell office:value-type="string">
            <text:p>Time</text:p>
          </table:table-cell>
          <table:table-cell office:value-type="string">
            <text:p>Voltage (V)</text:p>
          </table:table-cell>
          <table:table-cell office:value-type="string">
            <text:p>Current (A)</text:p>
          </table:table-cell>
          <table:table-cell office:value-type="string">
            <text:p>Status</text:p>
          </table:table-cell>
        </table:table-row>
        <table:table-row>
          <table:table-cell office:value-type="date" office:date-value="2023-12-31T14:00:00.000Z" table:style-name="ce69">
            <text:p>12/31/23</text:p>
          </table:table-cell>
          <table:table-cell office:value-type="float" office:value="230">
            <text:p>230</text:p>
          </table:table-cell>
          <table:table-cell office:value-type="float" office:value="1.5">
            <text:p>1.5</text:p>
          </table:table-cell>
          <table:table-cell office:value-type="string">
            <text:p>peak</text:p>
          </table:table-cell>
        </table:table-row>
        <table:table-row>
          <table:table-cell office:value-type="date" office:date-value="2023-12-31T15:00:00.000Z" table:style-name="ce69">
            <text:p>12/31/23</text:p>
          </table:table-cell>
          <table:table-cell office:value-type="float" office:value="231.63597348398076">
            <text:p>231.63597348398076</text:p>
          </table:table-cell>
          <table:table-cell office:value-type="float" office:value="1.51">
            <text:p>1.51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3-12-31T16:00:00.000Z" table:style-name="ce69">
            <text:p>12/31/23</text:p>
          </table:table-cell>
          <table:table-cell office:value-type="float" office:value="233.09184901534869">
            <text:p>233.09184901534869</text:p>
          </table:table-cell>
          <table:table-cell office:value-type="float" office:value="1.52">
            <text:p>1.52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3-12-31T17:00:00.000Z" table:style-name="ce69">
            <text:p>12/31/23</text:p>
          </table:table-cell>
          <table:table-cell office:value-type="float" office:value="234.2073549240395">
            <text:p>234.2073549240395</text:p>
          </table:table-cell>
          <table:table-cell office:value-type="float" office:value="1.53">
            <text:p>1.53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3-12-31T18:00:00.000Z" table:style-name="ce69">
            <text:p>12/31/23</text:p>
          </table:table-cell>
          <table:table-cell office:value-type="float" office:value="234.85968950681655">
            <text:p>234.85968950681655</text:p>
          </table:table-cell>
          <table:table-cell office:value-type="float" office:value="1.54">
            <text:p>1.54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3-12-31T19:00:00.000Z" table:style-name="ce69">
            <text:p>12/31/23</text:p>
          </table:table-cell>
          <table:table-cell office:value-type="float" office:value="234.97703978875882">
            <text:p>234.97703978875882</text:p>
          </table:table-cell>
          <table:table-cell office:value-type="float" office:value="1.55">
            <text:p>1.55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3-12-31T20:00:00.000Z" table:style-name="ce69">
            <text:p>12/31/23</text:p>
          </table:table-cell>
          <table:table-cell office:value-type="float" office:value="234.5464871341284">
            <text:p>234.5464871341284</text:p>
          </table:table-cell>
          <table:table-cell office:value-type="float" office:value="1.56">
            <text:p>1.56</text:p>
          </table:table-cell>
          <table:table-cell office:value-type="string">
            <text:p>peak</text:p>
          </table:table-cell>
        </table:table-row>
        <table:table-row>
          <table:table-cell office:value-type="date" office:date-value="2023-12-31T21:00:00.000Z" table:style-name="ce69">
            <text:p>12/31/23</text:p>
          </table:table-cell>
          <table:table-cell office:value-type="float" office:value="233.61542940869163">
            <text:p>233.61542940869163</text:p>
          </table:table-cell>
          <table:table-cell office:value-type="float" office:value="1.57">
            <text:p>1.57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3-12-31T22:00:00.000Z" table:style-name="ce69">
            <text:p>12/31/23</text:p>
          </table:table-cell>
          <table:table-cell office:value-type="float" office:value="232.28636313317907">
            <text:p>232.28636313317907</text:p>
          </table:table-cell>
          <table:table-cell office:value-type="float" office:value="1.58">
            <text:p>1.58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3-12-31T23:00:00.000Z" table:style-name="ce69">
            <text:p>12/31/23</text:p>
          </table:table-cell>
          <table:table-cell office:value-type="float" office:value="230.70560004029934">
            <text:p>230.70560004029934</text:p>
          </table:table-cell>
          <table:table-cell office:value-type="float" office:value="1.59">
            <text:p>1.59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00:00:00.000Z" table:style-name="ce69">
            <text:p>1/1/24</text:p>
          </table:table-cell>
          <table:table-cell office:value-type="float" office:value="229.04716018562257">
            <text:p>229.04716018562257</text:p>
          </table:table-cell>
          <table:table-cell office:value-type="float" office:value="1.6">
            <text:p>1.6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01:00:00.000Z" table:style-name="ce69">
            <text:p>1/1/24</text:p>
          </table:table-cell>
          <table:table-cell office:value-type="float" office:value="227.49361475705828">
            <text:p>227.49361475705828</text:p>
          </table:table-cell>
          <table:table-cell office:value-type="float" office:value="1.61">
            <text:p>1.61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02:00:00.000Z" table:style-name="ce69">
            <text:p>1/1/24</text:p>
          </table:table-cell>
          <table:table-cell office:value-type="float" office:value="226.21598752346037">
            <text:p>226.21598752346037</text:p>
          </table:table-cell>
          <table:table-cell office:value-type="float" office:value="1.62">
            <text:p>1.62</text:p>
          </table:table-cell>
          <table:table-cell office:value-type="string">
            <text:p>peak</text:p>
          </table:table-cell>
        </table:table-row>
        <table:table-row>
          <table:table-cell office:value-type="date" office:date-value="2024-01-01T03:00:00.000Z" table:style-name="ce69">
            <text:p>1/1/24</text:p>
          </table:table-cell>
          <table:table-cell office:value-type="float" office:value="225.3549274936462">
            <text:p>225.3549274936462</text:p>
          </table:table-cell>
          <table:table-cell office:value-type="float" office:value="1.63">
            <text:p>1.63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04:00:00.000Z" table:style-name="ce69">
            <text:p>1/1/24</text:p>
          </table:table-cell>
          <table:table-cell office:value-type="float" office:value="225.00522541451036">
            <text:p>225.00522541451036</text:p>
          </table:table-cell>
          <table:table-cell office:value-type="float" office:value="1.6400000000000001">
            <text:p>1.6400000000000001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05:00:00.000Z" table:style-name="ce69">
            <text:p>1/1/24</text:p>
          </table:table-cell>
          <table:table-cell office:value-type="float" office:value="225.2053786266843">
            <text:p>225.2053786266843</text:p>
          </table:table-cell>
          <table:table-cell office:value-type="float" office:value="1.65">
            <text:p>1.65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06:00:00.000Z" table:style-name="ce69">
            <text:p>1/1/24</text:p>
          </table:table-cell>
          <table:table-cell office:value-type="float" office:value="225.9333530421621">
            <text:p>225.9333530421621</text:p>
          </table:table-cell>
          <table:table-cell office:value-type="float" office:value="1.66">
            <text:p>1.66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07:00:00.000Z" table:style-name="ce69">
            <text:p>1/1/24</text:p>
          </table:table-cell>
          <table:table-cell office:value-type="float" office:value="227.10900879127846">
            <text:p>227.10900879127846</text:p>
          </table:table-cell>
          <table:table-cell office:value-type="float" office:value="1.67">
            <text:p>1.67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08:00:00.000Z" table:style-name="ce69">
            <text:p>1/1/24</text:p>
          </table:table-cell>
          <table:table-cell office:value-type="float" office:value="228.60292250900537">
            <text:p>228.60292250900537</text:p>
          </table:table-cell>
          <table:table-cell office:value-type="float" office:value="1.68">
            <text:p>1.68</text:p>
          </table:table-cell>
          <table:table-cell office:value-type="string">
            <text:p>peak</text:p>
          </table:table-cell>
        </table:table-row>
        <table:table-row>
          <table:table-cell office:value-type="date" office:date-value="2024-01-01T09:00:00.000Z" table:style-name="ce69">
            <text:p>1/1/24</text:p>
          </table:table-cell>
          <table:table-cell office:value-type="float" office:value="230.25063504941087">
            <text:p>230.25063504941087</text:p>
          </table:table-cell>
          <table:table-cell office:value-type="float" office:value="1.69">
            <text:p>1.69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10:00:00.000Z" table:style-name="ce69">
            <text:p>1/1/24</text:p>
          </table:table-cell>
          <table:table-cell office:value-type="float" office:value="231.8707561528561">
            <text:p>231.8707561528561</text:p>
          </table:table-cell>
          <table:table-cell office:value-type="float" office:value="1.7">
            <text:p>1.7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11:00:00.000Z" table:style-name="ce69">
            <text:p>1/1/24</text:p>
          </table:table-cell>
          <table:table-cell office:value-type="float" office:value="233.28493299359394">
            <text:p>233.28493299359394</text:p>
          </table:table-cell>
          <table:table-cell office:value-type="float" office:value="1.71">
            <text:p>1.71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12:00:00.000Z" table:style-name="ce69">
            <text:p>1/1/24</text:p>
          </table:table-cell>
          <table:table-cell office:value-type="float" office:value="234.33748434809402">
            <text:p>234.33748434809402</text:p>
          </table:table-cell>
          <table:table-cell office:value-type="float" office:value="1.72">
            <text:p>1.72</text:p>
          </table:table-cell>
          <table:table-cell office:value-type="string">
            <text:p>ok</text:p>
          </table:table-cell>
        </table:table-row>
        <table:table-row>
          <table:table-cell office:value-type="date" office:date-value="2024-01-01T13:00:00.000Z" table:style-name="ce69">
            <text:p>1/1/24</text:p>
          </table:table-cell>
          <table:table-cell office:value-type="float" office:value="234.91253893493186">
            <text:p>234.91253893493186</text:p>
          </table:table-cell>
          <table:table-cell office:value-type="float" office:value="1.73">
            <text:p>1.73</text:p>
          </table:table-cell>
          <table:table-cell office:value-type="string">
            <text:p>o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3</meta:generator>
  </office:meta>
</office:document-meta>
</file>