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19866933079506122">
            <text:p>0.19866933079506122</text:p>
          </table:table-cell>
          <table:table-cell office:value-type="float" office:value="0.9800665778412416">
            <text:p>0.98006657784124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3894183423086505">
            <text:p>0.3894183423086505</text:p>
          </table:table-cell>
          <table:table-cell office:value-type="float" office:value="0.9210609940028851">
            <text:p>0.921060994002885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5646424733950354">
            <text:p>0.5646424733950354</text:p>
          </table:table-cell>
          <table:table-cell office:value-type="float" office:value="0.8253356149096783">
            <text:p>0.825335614909678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7173560908995228">
            <text:p>0.7173560908995228</text:p>
          </table:table-cell>
          <table:table-cell office:value-type="float" office:value="0.6967067093471654">
            <text:p>0.696706709347165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8414709848078965">
            <text:p>0.8414709848078965</text:p>
          </table:table-cell>
          <table:table-cell office:value-type="float" office:value="0.5403023058681398">
            <text:p>0.540302305868139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9320390859672263">
            <text:p>0.9320390859672263</text:p>
          </table:table-cell>
          <table:table-cell office:value-type="float" office:value="0.3623577544766736">
            <text:p>0.362357754476673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9854497299884601">
            <text:p>0.9854497299884601</text:p>
          </table:table-cell>
          <table:table-cell office:value-type="float" office:value="0.16996714290024104">
            <text:p>0.1699671429002410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9995736030415051">
            <text:p>0.9995736030415051</text:p>
          </table:table-cell>
          <table:table-cell office:value-type="float" office:value="-0.029199522301288815">
            <text:p>-0.02919952230128881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9738476308781951">
            <text:p>0.9738476308781951</text:p>
          </table:table-cell>
          <table:table-cell office:value-type="float" office:value="-0.2272020946930871">
            <text:p>-0.227202094693087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9092974268256817">
            <text:p>0.9092974268256817</text:p>
          </table:table-cell>
          <table:table-cell office:value-type="float" office:value="-0.4161468365471424">
            <text:p>-0.416146836547142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8084964038195901">
            <text:p>0.8084964038195901</text:p>
          </table:table-cell>
          <table:table-cell office:value-type="float" office:value="-0.5885011172553458">
            <text:p>-0.5885011172553458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675463180551151">
            <text:p>0.675463180551151</text:p>
          </table:table-cell>
          <table:table-cell office:value-type="float" office:value="-0.7373937155412454">
            <text:p>-0.737393715541245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155013718214642">
            <text:p>0.5155013718214642</text:p>
          </table:table-cell>
          <table:table-cell office:value-type="float" office:value="-0.8568887533689473">
            <text:p>-0.856888753368947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349881501559051">
            <text:p>0.3349881501559051</text:p>
          </table:table-cell>
          <table:table-cell office:value-type="float" office:value="-0.9422223406686581">
            <text:p>-0.942222340668658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411200080598672">
            <text:p>0.1411200080598672</text:p>
          </table:table-cell>
          <table:table-cell office:value-type="float" office:value="-0.9899924966004454">
            <text:p>-0.9899924966004454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-0.058374143427580086">
            <text:p>-0.058374143427580086</text:p>
          </table:table-cell>
          <table:table-cell office:value-type="float" office:value="-0.9982947757947531">
            <text:p>-0.998294775794753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2555411020268312">
            <text:p>-0.2555411020268312</text:p>
          </table:table-cell>
          <table:table-cell office:value-type="float" office:value="-0.9667981925794611">
            <text:p>-0.966798192579461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-0.44252044329485246">
            <text:p>-0.44252044329485246</text:p>
          </table:table-cell>
          <table:table-cell office:value-type="float" office:value="-0.896758416334147">
            <text:p>-0.896758416334147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-0.6118578909427189">
            <text:p>-0.6118578909427189</text:p>
          </table:table-cell>
          <table:table-cell office:value-type="float" office:value="-0.7909677119144168">
            <text:p>-0.790967711914416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7568024953079282">
            <text:p>-0.7568024953079282</text:p>
          </table:table-cell>
          <table:table-cell office:value-type="float" office:value="-0.6536436208636119">
            <text:p>-0.653643620863611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-0.8715757724135882">
            <text:p>-0.8715757724135882</text:p>
          </table:table-cell>
          <table:table-cell office:value-type="float" office:value="-0.4902608213406994">
            <text:p>-0.49026082134069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-0.9516020738895161">
            <text:p>-0.9516020738895161</text:p>
          </table:table-cell>
          <table:table-cell office:value-type="float" office:value="-0.30733286997841935">
            <text:p>-0.3073328699784193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-0.9936910036334644">
            <text:p>-0.9936910036334644</text:p>
          </table:table-cell>
          <table:table-cell office:value-type="float" office:value="-0.11215252693505487">
            <text:p>-0.1121525269350548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9961646088358407">
            <text:p>-0.9961646088358407</text:p>
          </table:table-cell>
          <table:table-cell office:value-type="float" office:value="0.0874989834394464">
            <text:p>0.087498983439446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-0.9589242746631385">
            <text:p>-0.9589242746631385</text:p>
          </table:table-cell>
          <table:table-cell office:value-type="float" office:value="0.28366218546322625">
            <text:p>0.2836621854632262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8834546557201531">
            <text:p>-0.8834546557201531</text:p>
          </table:table-cell>
          <table:table-cell office:value-type="float" office:value="0.4685166713003771">
            <text:p>0.468516671300377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-0.7727644875559871">
            <text:p>-0.7727644875559871</text:p>
          </table:table-cell>
          <table:table-cell office:value-type="float" office:value="0.6346928759426347">
            <text:p>0.63469287594263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6312666378723216">
            <text:p>-0.6312666378723216</text:p>
          </table:table-cell>
          <table:table-cell office:value-type="float" office:value="0.7755658785102496">
            <text:p>0.7755658785102496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-0.46460217941375737">
            <text:p>-0.46460217941375737</text:p>
          </table:table-cell>
          <table:table-cell office:value-type="float" office:value="0.8855195169413189">
            <text:p>0.885519516941318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27941549819892586">
            <text:p>-0.27941549819892586</text:p>
          </table:table-cell>
          <table:table-cell office:value-type="float" office:value="0.9601702866503661">
            <text:p>0.960170286650366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0.0830894028174964">
            <text:p>-0.0830894028174964</text:p>
          </table:table-cell>
          <table:table-cell office:value-type="float" office:value="0.9965420970232175">
            <text:p>0.996542097023217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11654920485049364">
            <text:p>0.11654920485049364</text:p>
          </table:table-cell>
          <table:table-cell office:value-type="float" office:value="0.9931849187581926">
            <text:p>0.9931849187581926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31154136351337786">
            <text:p>0.31154136351337786</text:p>
          </table:table-cell>
          <table:table-cell office:value-type="float" office:value="0.9502325919585296">
            <text:p>0.9502325919585296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49411335113860816">
            <text:p>0.49411335113860816</text:p>
          </table:table-cell>
          <table:table-cell office:value-type="float" office:value="0.8693974903498253">
            <text:p>0.8693974903498253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6569865987187891">
            <text:p>0.6569865987187891</text:p>
          </table:table-cell>
          <table:table-cell office:value-type="float" office:value="0.7539022543433046">
            <text:p>0.7539022543433046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7936678638491532">
            <text:p>0.7936678638491532</text:p>
          </table:table-cell>
          <table:table-cell office:value-type="float" office:value="0.6083513145322546">
            <text:p>0.6083513145322546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8987080958116269">
            <text:p>0.8987080958116269</text:p>
          </table:table-cell>
          <table:table-cell office:value-type="float" office:value="0.43854732757439036">
            <text:p>0.43854732757439036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9679196720314863">
            <text:p>0.9679196720314863</text:p>
          </table:table-cell>
          <table:table-cell office:value-type="float" office:value="0.2512598425822557">
            <text:p>0.2512598425822557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998543345374605">
            <text:p>0.998543345374605</text:p>
          </table:table-cell>
          <table:table-cell office:value-type="float" office:value="0.05395542056264975">
            <text:p>0.053955420562649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